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2cadd4"/>
    </style:style>
    <style:style style:name="P2" style:family="paragraph" style:parent-style-name="Header">
      <style:text-properties officeooo:paragraph-rsid="002c93a1"/>
    </style:style>
    <style:style style:name="P3" style:family="paragraph" style:parent-style-name="Standard">
      <style:text-properties officeooo:paragraph-rsid="0051616b"/>
    </style:style>
    <style:style style:name="P4" style:family="paragraph" style:parent-style-name="Text_20_body">
      <style:text-properties officeooo:rsid="00571cae" officeooo:paragraph-rsid="00571cae"/>
    </style:style>
    <style:style style:name="P5" style:family="paragraph" style:parent-style-name="Text_20_body">
      <style:text-properties officeooo:rsid="00571cae" officeooo:paragraph-rsid="0084746e"/>
    </style:style>
    <style:style style:name="P6" style:family="paragraph" style:parent-style-name="Text_20_body">
      <style:text-properties officeooo:rsid="005c1c3a" officeooo:paragraph-rsid="005c1c3a"/>
    </style:style>
    <style:style style:name="P7" style:family="paragraph" style:parent-style-name="Text_20_body">
      <style:text-properties officeooo:rsid="005dc997" officeooo:paragraph-rsid="005dc997"/>
    </style:style>
    <style:style style:name="P8" style:family="paragraph" style:parent-style-name="Text_20_body">
      <style:text-properties officeooo:rsid="00640907" officeooo:paragraph-rsid="007070a4"/>
    </style:style>
    <style:style style:name="P9" style:family="paragraph" style:parent-style-name="Text_20_body">
      <style:text-properties officeooo:rsid="00640907" officeooo:paragraph-rsid="0072ef67"/>
    </style:style>
    <style:style style:name="P10" style:family="paragraph" style:parent-style-name="Text_20_body">
      <style:text-properties officeooo:rsid="006df8fb" officeooo:paragraph-rsid="006df8fb"/>
    </style:style>
    <style:style style:name="P11" style:family="paragraph" style:parent-style-name="Text_20_body">
      <style:text-properties officeooo:rsid="0076ca30" officeooo:paragraph-rsid="009107fe"/>
    </style:style>
    <style:style style:name="P12" style:family="paragraph" style:parent-style-name="Text_20_body">
      <style:text-properties officeooo:rsid="00788a0a" officeooo:paragraph-rsid="00788a0a"/>
    </style:style>
    <style:style style:name="P13" style:family="paragraph" style:parent-style-name="Text_20_body">
      <style:text-properties officeooo:rsid="007a7600" officeooo:paragraph-rsid="007a7600"/>
    </style:style>
    <style:style style:name="P14" style:family="paragraph" style:parent-style-name="Text_20_body">
      <style:text-properties officeooo:rsid="0098d528" officeooo:paragraph-rsid="0098d528"/>
    </style:style>
    <style:style style:name="P15" style:family="paragraph" style:parent-style-name="Standard" style:master-page-name="Index">
      <style:paragraph-properties style:page-number="auto"/>
      <style:text-properties officeooo:paragraph-rsid="0051616b"/>
    </style:style>
    <style:style style:name="P16" style:family="paragraph" style:parent-style-name="Chapter" style:master-page-name="Start_20_of_20_Chapter">
      <style:paragraph-properties style:page-number="auto"/>
    </style:style>
    <style:style style:name="T1" style:family="text">
      <style:text-properties officeooo:rsid="0058ed18"/>
    </style:style>
    <style:style style:name="T2" style:family="text">
      <style:text-properties officeooo:rsid="005a902f"/>
    </style:style>
    <style:style style:name="T3" style:family="text">
      <style:text-properties officeooo:rsid="005bb436"/>
    </style:style>
    <style:style style:name="T4" style:family="text">
      <style:text-properties officeooo:rsid="005f9a86"/>
    </style:style>
    <style:style style:name="T5" style:family="text">
      <style:text-properties officeooo:rsid="0060ac2b"/>
    </style:style>
    <style:style style:name="T6" style:family="text">
      <style:text-properties officeooo:rsid="006130da"/>
    </style:style>
    <style:style style:name="T7" style:family="text">
      <style:text-properties officeooo:rsid="00614416"/>
    </style:style>
    <style:style style:name="T8" style:family="text">
      <style:text-properties officeooo:rsid="00655f8a"/>
    </style:style>
    <style:style style:name="T9" style:family="text">
      <style:text-properties officeooo:rsid="0065c87b"/>
    </style:style>
    <style:style style:name="T10" style:family="text">
      <style:text-properties officeooo:rsid="00679dcc"/>
    </style:style>
    <style:style style:name="T11" style:family="text">
      <style:text-properties officeooo:rsid="006cc448"/>
    </style:style>
    <style:style style:name="T12" style:family="text">
      <style:text-properties officeooo:rsid="006df8fb"/>
    </style:style>
    <style:style style:name="T13" style:family="text">
      <style:text-properties officeooo:rsid="006e3fc3"/>
    </style:style>
    <style:style style:name="T14" style:family="text">
      <style:text-properties officeooo:rsid="006e9e26"/>
    </style:style>
    <style:style style:name="T15" style:family="text">
      <style:text-properties officeooo:rsid="006ead34"/>
    </style:style>
    <style:style style:name="T16" style:family="text">
      <style:text-properties officeooo:rsid="007070a4"/>
    </style:style>
    <style:style style:name="T17" style:family="text">
      <style:text-properties officeooo:rsid="0071947e"/>
    </style:style>
    <style:style style:name="T18" style:family="text">
      <style:text-properties officeooo:rsid="007251b6"/>
    </style:style>
    <style:style style:name="T19" style:family="text">
      <style:text-properties officeooo:rsid="0072ef67"/>
    </style:style>
    <style:style style:name="T20" style:family="text">
      <style:text-properties officeooo:rsid="0073f84e"/>
    </style:style>
    <style:style style:name="T21" style:family="text">
      <style:text-properties officeooo:rsid="007da98d"/>
    </style:style>
    <style:style style:name="T22" style:family="text">
      <style:text-properties officeooo:rsid="007f8775"/>
    </style:style>
    <style:style style:name="T23" style:family="text">
      <style:text-properties officeooo:rsid="008178eb"/>
    </style:style>
    <style:style style:name="T24" style:family="text">
      <style:text-properties officeooo:rsid="008291ad"/>
    </style:style>
    <style:style style:name="T25" style:family="text">
      <style:text-properties officeooo:rsid="00841e80"/>
    </style:style>
    <style:style style:name="T26" style:family="text">
      <style:text-properties officeooo:rsid="0085ea7b"/>
    </style:style>
    <style:style style:name="T27" style:family="text">
      <style:text-properties officeooo:rsid="008638c3"/>
    </style:style>
    <style:style style:name="T28" style:family="text">
      <style:text-properties officeooo:rsid="0087294e"/>
    </style:style>
    <style:style style:name="T29" style:family="text">
      <style:text-properties officeooo:rsid="0087d599"/>
    </style:style>
    <style:style style:name="T30" style:family="text">
      <style:text-properties officeooo:rsid="00892a42"/>
    </style:style>
    <style:style style:name="T31" style:family="text">
      <style:text-properties officeooo:rsid="008ace5e"/>
    </style:style>
    <style:style style:name="T32" style:family="text">
      <style:text-properties officeooo:rsid="008bde39"/>
    </style:style>
    <style:style style:name="T33" style:family="text">
      <style:text-properties officeooo:rsid="008c4288"/>
    </style:style>
    <style:style style:name="T34" style:family="text">
      <style:text-properties officeooo:rsid="008d05a1"/>
    </style:style>
    <style:style style:name="T35" style:family="text">
      <style:text-properties officeooo:rsid="008e4c2c"/>
    </style:style>
    <style:style style:name="T36" style:family="text">
      <style:text-properties officeooo:rsid="009107fe"/>
    </style:style>
    <style:style style:name="T37" style:family="text">
      <style:text-properties officeooo:rsid="00921231"/>
    </style:style>
    <style:style style:name="T38" style:family="text">
      <style:text-properties officeooo:rsid="0092f515"/>
    </style:style>
    <style:style style:name="T39" style:family="text">
      <style:text-properties officeooo:rsid="0093d551"/>
    </style:style>
    <style:style style:name="T40" style:family="text">
      <style:text-properties officeooo:rsid="00952c24"/>
    </style:style>
    <style:style style:name="T41" style:family="text">
      <style:text-properties officeooo:rsid="0099ec46"/>
    </style:style>
    <style:style style:name="T42" style:family="text">
      <style:text-properties officeooo:rsid="009cc0da"/>
    </style:style>
    <style:style style:name="T43" style:family="text">
      <style:text-properties officeooo:rsid="009e8850"/>
    </style:style>
    <style:style style:name="T44" style:family="text">
      <style:text-properties officeooo:rsid="00a08187"/>
    </style:style>
    <style:style style:name="T45" style:family="text">
      <style:text-properties officeooo:rsid="00a281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
      <text:h text:style-name="P16" text:outline-level="2">Chapter One<text:line-break/>The <text:span text:style-name="T22">Basics </text:span>of <text:span text:style-name="T21">Script Spectre</text:span></text:h>
      <text:p text:style-name="P10">The narrator <text:span text:style-name="T13">for this short book</text:span> is <text:span text:style-name="T23">voice cloned </text:span><text:span text:style-name="T42">from</text:span> David Clark from Librivox dot org.</text:p>
      <text:p text:style-name="P4">This is a short audio script intended to be read{red} by Script Spectre. <text:s/>Note the use of curly brackets for a word substitution <text:span text:style-name="T24">in that last sentence</text:span>. <text:s/>That alters the text that’s fed to the text to speech engine and is most useful for words that are spelled the same, but have different pronunciations, of which English has far too many.</text:p>
      <text:p text:style-name="P5">“<text:span text:style-name="T1">[cori]This is the voice of Cori Samuel, </text:span><text:span text:style-name="T14">also</text:span><text:span text:style-name="T1"> </text:span><text:span text:style-name="T3">from Librivox</text:span><text:span text:style-name="T1">, to demonstrate how to switch speakers.[narrator]” </text:span><text:span text:style-name="T25">Cori declared,</text:span><text:span text:style-name="T1"> “[cori]</text:span><text:span text:style-name="T2">Note the use of square brackets surrounding the names of voices from the build file </text:span><text:span text:style-name="T15">and the way a change of speaker lasts until another is specified.</text:span><text:span text:style-name="T1">[narrator]”</text:span></text:p>
      <text:p text:style-name="P8"><text:span text:style-name="T16">Jodi decided to interject at that point, by adding, </text:span>“[jodi]<text:span text:style-name="T12">And this is the voice of Jodi Krangle, </text:span><text:span text:style-name="T15">again from Librivox. <text:s/></text:span><text:span text:style-name="T26">You’ll hear more from me </text:span><text:span text:style-name="T27">in the </text:span><text:span text:style-name="T28">second</text:span><text:span text:style-name="T27"> chapter</text:span><text:span text:style-name="T26">.</text:span><text:span text:style-name="T43">[narrator]</text:span><text:span text:style-name="T15">”</text:span></text:p>
      <text:p text:style-name="P9">Please note the fact double quotes are stripped out <text:span text:style-name="T16">and instead mark the beginning of a new sentence</text:span>, because many text to speech engines tend to stumble over them, behav<text:span text:style-name="T29">ing</text:span> in unexpected ways. <text:s/><text:span text:style-name="T30">Additionally, </text:span><text:span text:style-name="T16">this software is geared toward reading novels, </text:span><text:span text:style-name="T30">which is why they’re treated as sentence breaks</text:span>. <text:s/><text:span text:style-name="T10">Single quotes, on the other hand, are </text:span><text:span text:style-name="T31">treated quite differently, because</text:span><text:span text:style-name="T10"> </text:span><text:span text:style-name="T17">characters sometimes quote each other. <text:s/></text:span><text:span text:style-name="T18">The better engines treat that as the opportunity for a slight shift in mannerism</text:span><text:span text:style-name="T10">. <text:s/></text:span><text:span text:style-name="T19">An interesting and useful trick is to use </text:span><text:span text:style-name="T10">them almost like ‘emphasis’ marks </text:span><text:span text:style-name="T20">on short, one or two word phrases</text:span><text:span text:style-name="T10">.</text:span></text:p>
      <text:p text:style-name="Scene_20_Break">*<text:tab/>*<text:tab/>*</text:p>
      <text:p text:style-name="P6"><text:span text:style-name="T8">Als</text:span><text:span text:style-name="T11">o</text:span> note the <text:span text:style-name="T4">way the</text:span> three asterisks <text:span text:style-name="T32">separated by tabs</text:span>, <text:span text:style-name="T9">just above,</text:span> get turned into a pause, for a scene break.</text:p>
      <text:p text:style-name="P7"><text:soft-page-break/>While we’re on the subject of script direction, lead in and lead out <text:span text:style-name="T33">sound effects</text:span> are automatically added at the start and end of each chapter. <text:s/><text:span text:style-name="T7">However, they’re </text:span><text:span text:style-name="T34">merely</text:span><text:span text:style-name="T5"> silent </text:span><text:span text:style-name="T34">pauses of </text:span><text:span text:style-name="T5">a </text:span><text:span text:style-name="T6">specific</text:span><text:span text:style-name="T5"> length and can be overridden with a</text:span><text:span text:style-name="T35">ny other</text:span><text:span text:style-name="T5"> d</text:span><text:span text:style-name="T35">esired</text:span><text:span text:style-name="T5"> effect.</text:span></text:p>
      <text:h text:style-name="P16" text:outline-level="2">Chapter Two<text:line-break/>Further Steps</text:h>
      <text:p text:style-name="P11"><text:span text:style-name="T36">To go further, I’ll start by </text:span>demonstrat<text:span text:style-name="T36">ing</text:span> the use of sound effects. <text:s/>The following <text:span text:style-name="T37">clip</text:span> was assembled from public domain <text:span text:style-name="T38">sound effects</text:span> for the audiobook of <text:span text:style-name="Emphasis">Starwitch</text:span>, by Owen Tyme, which is titled ‘Romance Interrupted’, <text:span text:style-name="T39">to help add a little humor to some interrupted kisses</text:span>.</text:p>
      <text:p text:style-name="P11">[romance_interrupted]</text:p>
      <text:p text:style-name="P12">It’s <text:span text:style-name="T40">also</text:span> worth noting that the ‘turbo’ model of Chatterbox can do something interesting the others can’t: para-linguistic tags. <text:s/>These are specified via angle brackets, which are also know<text:span text:style-name="T44">n</text:span> as less than and greater than. <text:s/>The complete list is available in the build file.</text:p>
      <text:p text:style-name="P13">Here’s Jodi to demonstrate: “[jodi_cb] &lt;laugh&gt; Isn’t it funny that I can laugh? <text:s/>I may be getting a little &lt;cough&gt; sick, though. <text:s/>&lt;groan&gt; I don’t like that.<text:span text:style-name="T45">[narrator]</text:span>”</text:p>
      <text:p text:style-name="P14">I hope this little demonstration <text:span text:style-name="T41">has been </text:span>helpful, and happy audiobook produ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402in" fo:margin-bottom="0.0799in" style:contextual-spacing="false"/>
      <style:text-properties fo:font-size="115%" fo:font-weight="bold" style:font-size-asian="115%" style:font-weight-asian="bold" style:font-size-complex="115%" style:font-weight-complex="bold"/>
    </style:style>
    <style:style style:name="Chapter" style:family="paragraph" style:parent-style-name="Heading" style:next-style-name="Text_20_body" style:default-outline-level="2"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Part" style:family="paragraph" style:parent-style-name="Heading" style:next-style-name="Chapter" style:default-outline-level="1" style:list-style-name="" style:master-page-name="Start_20_of_20_Part">
      <style:paragraph-properties fo:line-height="150%" fo:text-align="center" style:justify-single-word="false" style:page-number="auto"/>
      <style:text-properties fo:font-size="200%" fo:font-weight="bold" style:font-size-asian="200%" style:font-weight-asian="bold"/>
    </style:style>
    <style:style style:name="Prologue_2f_Epilogue" style:display-name="Prologue/Epilogue" style:family="paragraph" style:parent-style-name="Heading" style:next-style-name="Text_20_body" style:default-outline-level="1"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Scene_20_Break" style:display-name="Scene Break" style:family="paragraph" style:parent-style-name="Text_20_body" style:next-style-name="Text_20_body">
      <style:paragraph-properties fo:margin-left="0in" fo:margin-right="0in" fo:text-align="center" style:justify-single-word="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2cadd4"/>
    </style:style>
    <style:style style:name="MP2" style:family="paragraph" style:parent-style-name="Header">
      <style:text-properties officeooo:paragraph-rsid="002c93a1"/>
    </style:style>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4.7902in" fo:margin-bottom="4.7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ab/><text:user-defined style:data-style-name="N0" text:name="Author">Owen Tyme</text:user-defined> / <text:title>[Title]</text:title><text:s/>/ <text:page-number text:select-page="current">3</text:page-number></text:p>
      </style:header>
    </style:master-page>
    <style:master-page style:name="Index" style:page-layout-name="Mpm2" draw:style-name="Mdp1"/>
    <style:master-page style:name="Right_20_Page" style:display-name="Right Page" style:page-layout-name="Mpm3" draw:style-name="Mdp1" style:next-style-name="Left_20_Page">
      <style:header>
        <text:p text:style-name="Header"><text:tab/><text:title>[Title]</text:title><text:tab/><text:page-number text:select-page="current">0</text:page-number></text:p>
      </style:header>
    </style:master-page>
    <style:master-page style:name="Left_20_Page" style:display-name="Left Page" style:page-layout-name="Mpm4" draw:style-name="Mdp1" style:next-style-name="Right_20_Page">
      <style:header>
        <text:p text:style-name="MP2"><text:page-number text:select-page="current">0</text:page-number><text:tab/><text:user-defined style:data-style-name="N0" text:name="Author">Owen Tyme</text:user-defined></text:p>
      </style:header>
    </style:master-page>
    <style:master-page style:name="First_20_Page" style:display-name="First Page" style:page-layout-name="Mpm2" draw:style-name="Mdp1" style:next-style-name="Standard"/>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art_20_of_20_Chapter" style:display-name="Start of Chapter" style:page-layout-name="Mpm9" draw:style-name="Mdp1" style:next-style-name="Standard"/>
    <style:master-page style:name="Start_20_of_20_Part" style:display-name="Start of Part" style:page-layout-name="Mpm10" draw:style-name="Mdp1" style:next-style-name="Start_20_of_20_Chapter"/>
    <style:master-page style:name="Title_20_Page" style:display-name="Title Page" style:page-layout-name="Mpm11" draw:style-name="Mdp1" style:next-style-name="Start_20_of_20_Chapter"/>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wen Tyme</meta:initial-creator>
    <meta:creation-date>2023-07-08T09:10:21.318379991</meta:creation-date>
    <meta:editing-cycles>115</meta:editing-cycles>
    <meta:editing-duration>PT4H29M5S</meta:editing-duration>
    <dc:title>[Title]</dc:title>
    <dc:date>2026-07-05T23:56:59.768127675</dc:date>
    <dc:creator>Richard Owen Lewis</dc:creator>
    <meta:generator>LibreOffice/7.3.7.2$Linux_X86_64 LibreOffice_project/30$Build-2</meta:generator>
    <meta:document-statistic meta:table-count="0" meta:image-count="0" meta:object-count="0" meta:page-count="4" meta:paragraph-count="18" meta:word-count="469" meta:character-count="2811" meta:non-whitespace-character-count="2345"/>
    <meta:user-defined meta:name="Author">Owen Tyme</meta:user-defined>
    <meta:user-defined meta:name="Subtitle">[Subtitle]</meta:user-defined>
  </office:meta>
</office:document-meta>
</file>